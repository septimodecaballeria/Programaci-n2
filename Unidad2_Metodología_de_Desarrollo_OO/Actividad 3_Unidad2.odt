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marco de trabajo de la Junta de Andalucía para el desarrollo de software se denomina <text:span text:style-name="T1">MADEJA</text:span> (Marco de Desarrollo de la Junta de Andalucía). A continuación, presento un análisis detallado basado en la exploración de su documentación técnica y recursos de ingeniería de requisitos:</text:p>
      <text:h text:style-name="Heading_20_3" text:outline-level="3">1. Elementos principales del Marco MADEJA</text:h>
      <text:p text:style-name="Text_20_body">El "Marco de Desarrollo" no es solo una guía, sino un ecosistema estructurado para estandarizar la producción de software. Sus pilares son:</text:p>
      <text:list text:style-name="L1">
        <text:list-item>
          <text:p text:style-name="P1"><text:span text:style-name="T1">Normalización:</text:span> Establece pautas obligatorias y recomendadas para que todos los proyectos sigan una estructura coherente.</text:p>
        </text:list-item>
        <text:list-item>
          <text:p text:style-name="P1"><text:span text:style-name="T1">Orientación a Procesos:</text:span> Define flujos de trabajo claros para cada fase (Requisitos, Diseño, Construcción, Pruebas e Implantación).</text:p>
        </text:list-item>
        <text:list-item>
          <text:p text:style-name="P1"><text:span text:style-name="T1">Modelo de Roles:</text:span> Identifica quién hace qué (ej. Analista de Requisitos, Responsable de Calidad, Stakeholders).</text:p>
        </text:list-item>
        <text:list-item>
          <text:p text:style-name="P1"><text:span text:style-name="T1">Gestión de Activos:</text:span> Fomenta la reutilización de componentes y bibliotecas comunes de la Junta.</text:p>
        </text:list-item>
      </text:list>
      <text:h text:style-name="Heading_20_3" text:outline-level="3">2. Ingeniería de Requisitos en MADEJA</text:h>
      <text:p text:style-name="Text_20_body">La documentación técnica desglosa esta disciplina en tres actividades críticas:</text:p>
      <text:list text:style-name="L2">
        <text:list-item>
          <text:p text:style-name="P2"><text:span text:style-name="T1">Definición de Requisitos (ERS):</text:span> El objetivo es generar la <text:span text:style-name="T1">Especificación de Requisitos del Sistema</text:span>. Se divide en requisitos funcionales, de restricción técnica (ej. compatibilidad con bases de datos específicas como Oracle) y de integración.</text:p>
        </text:list-item>
        <text:list-item>
          <text:p text:style-name="P2"><text:span text:style-name="T1">Gestión de Líneas Base:</text:span> Controlar las versiones de los requisitos para que el equipo trabaje siempre sobre la última definición aprobada.</text:p>
        </text:list-item>
        <text:list-item>
          <text:p text:style-name="P2"><text:span text:style-name="T1">Trazabilidad:</text:span> Asegurar que cada requisito se vea reflejado en el diseño, el código y las pruebas finales.</text:p>
        </text:list-item>
      </text:list>
      <text:h text:style-name="Heading_20_3" text:outline-level="3">3. Recursos de Apoyo y Plantillas</text:h>
      <text:p text:style-name="Text_20_body">En la sección de documentación y plantillas, se destacan recursos listos para usar que facilitan la labor del analista:</text:p>
      <text:list text:style-name="L3">
        <text:list-item>
          <text:p text:style-name="P3"><text:span text:style-name="T1">Plantilla de ERS (Especificación de Requisitos de Software):</text:span> Un documento estructurado con secciones para el dominio del problema, objetivos del sistema y requisitos de integración.</text:p>
        </text:list-item>
        <text:list-item>
          <text:p text:style-name="P3"><text:span text:style-name="T1">Catálogo de Casos de Uso:</text:span> Formatos estándar para describir la interacción del usuario con el sistema, incluyendo flujos principales y alternativos.</text:p>
        </text:list-item>
        <text:list-item>
          <text:p text:style-name="P3"><text:span text:style-name="T1">Matriz de Trazabilidad:</text:span> Herramienta para vincular requisitos con otros entregables del proyecto.</text:p>
        </text:list-item>
        <text:list-item>
          <text:p text:style-name="P3"><text:span text:style-name="T1">Guías de Estilo y Validación:</text:span> Checklists para asegurar que los requisitos escritos sean verificables y no ambiguos.</text:p>
        </text:list-item>
      </text:list>
      <text:h text:style-name="Heading_20_3" text:outline-level="3"><text:soft-page-break/>4. Reflexión sobre su relevancia y utilidad</text:h>
      <text:p text:style-name="Text_20_body">La existencia de este marco técnico es fundamental por varias razones:</text:p>
      <text:list text:style-name="L4">
        <text:list-item>
          <text:p text:style-name="P4"><text:span text:style-name="T1">Reducción de Riesgos:</text:span> Al tener procesos definidos (como el <text:span text:style-name="Source_20_Text">PROC-0021</text:span> para gestión de cambios), se minimiza la posibilidad de que el proyecto se desvíe en tiempo o coste.</text:p>
        </text:list-item>
        <text:list-item>
          <text:p text:style-name="P4"><text:span text:style-name="T1">Mantenibilidad:</text:span> El uso de plantillas estándar permite que un equipo distinto pueda retomar el mantenimiento de una aplicación sin tener que "descifrar" cómo se documentó originalmente.</text:p>
        </text:list-item>
        <text:list-item>
          <text:p text:style-name="P4"><text:span text:style-name="T1">Calidad del Producto Final:</text:span> Al obligar a una fase de requisitos rigurosa, se garantiza que el software realmente solucione las necesidades de negocio de la administración y del ciudadano, evitando el desarrollo de funciones innecesarias.</text:p>
        </text:list-item>
      </text:list>
      <text:p text:style-name="Text_20_body">Esta documentación es una herramienta valiosa no solo para la administración pública, sino como <text:span text:style-name="T1">referencia profesional</text:span>, ya que aplica estándares internacionales (como ISO/IEC) a un contexto práctico y real de desarrollo a gran escal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2:16:24.845565400</meta:creation-date>
    <dc:date>2026-05-08T12:17:28.786151900</dc:date>
    <meta:editing-duration>PT1M5S</meta:editing-duration>
    <meta:editing-cycles>1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24" meta:word-count="477" meta:character-count="3160" meta:non-whitespace-character-count="2721"/>
  </office:meta>
</office:document-meta>
</file>