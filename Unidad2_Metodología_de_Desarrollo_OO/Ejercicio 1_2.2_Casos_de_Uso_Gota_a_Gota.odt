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D40000011D7847167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Heading_20_3">
      <style:text-properties fo:font-weight="bold" style:font-weight-asian="bold" style:font-weight-complex="bold"/>
    </style:style>
    <style:style style:name="P3" style:family="paragraph" style:parent-style-name="Text_20_body" style:list-style-name="L1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Heading_20_3">
      <style:text-properties style:font-name="Google Sans" fo:font-weight="normal" style:font-weight-asian="normal" style:font-weight-complex="normal"/>
    </style:style>
    <style:style style:name="P6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fo:font-weight="normal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normal" style:font-weight-asian="normal" style:font-weight-complex="normal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style:font-weight-asian="normal" style:font-weight-complex="normal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style:font-weight-asian="normal" style:font-weight-complex="normal"/>
    </style:style>
    <style:style style:name="P1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fo:font-weight="normal" style:font-weight-asian="normal" style:font-weight-complex="normal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style:font-weight-asian="normal" style:font-weight-complex="normal"/>
    </style:style>
    <style:style style:name="P13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4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style:font-weight-asian="normal" style:font-weight-complex="normal"/>
    </style:style>
    <style:style style:name="P15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6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style:font-weight-asian="normal" style:font-weight-complex="normal"/>
    </style:style>
    <style:style style:name="P17" style:family="paragraph" style:parent-style-name="Text_20_body" style:list-style-name="L7">
      <style:text-properties fo:font-style="italic" fo:font-weight="normal" style:font-weight-asian="normal" style:font-weight-complex="normal"/>
    </style:style>
    <style:style style:name="P18" style:family="paragraph" style:parent-style-name="Text_20_body" style:list-style-name="L8">
      <style:text-properties fo:font-style="italic"/>
    </style:style>
    <style:style style:name="T1" style:family="text">
      <style:text-properties fo:font-style="italic"/>
    </style:style>
    <style:style style:name="T2" style:family="text">
      <style:text-properties style:font-name="Google Sans Text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ctividad B: Expansión Histórica — "Cómo llegamos hasta aquí" y el viaje hasta nuestros días</text:h>
      <text:p text:style-name="P1">El apartado "Cómo llegamos hasta aquí" de <text:span text:style-name="T1">UML Gota a Gota</text:span> (Fowler) explica la crisis de los años 80 y 90, conocida como la guerra de métodos, donde decenas de autores competían con sus propias notaciones orientadas a objetos (Booch, OMT de Rumbaugh, OOSE de Jacobson). La unificación de estos tres "amigos" dio nacimiento a UML 1.x a finales de los 90 bajo el amparo del OMG (Object Management Group).</text:p>
      <text:p text:style-name="P1">A continuación, tenés la expansión de esa cronología extendida hasta la actualidad (2026):</text:p>
      <text:h text:style-name="P2" text:outline-level="3">La Evolución de UML: De la unificación a la era moderna</text:h>
      <text:list text:style-name="L1">
        <text:list-item>
          <text:p text:style-name="P3">1997 - UML 1.1 (La Unificación): El OMG adopta UML como estándar. Se frena la fragmentación de la industria y se unifican los conceptos de clases, casos de uso e interacciones en una sola sintaxis gráfica.</text:p>
        </text:list-item>
        <text:list-item>
          <text:p text:style-name="P3">2005 - UML 2.0 (El Gran Rediseño): Ante el crecimiento de sistemas complejos, UML 2.0 reestructura el metamodelo. Se introducen mejoras drásticas en los diagramas de secuencia (con fragmentos combinados como <text:span text:style-name="T1">alt</text:span>, <text:span text:style-name="T1">loop</text:span> y <text:span text:style-name="T1">opt</text:span>), se formalizan los diagramas de componentes y de estructura compuesta, y se eleva el número total de diagramas para dar soporte a arquitecturas a gran escala.</text:p>
        </text:list-item>
        <text:list-item>
          <text:p text:style-name="P3">2011-2015 - UML 2.5 y la simplificación: Tras años de críticas que acusaban a UML de ser "demasiado pesado" (<text:span text:style-name="T1">bloated</text:span>), la versión 2.5 reduce la complejidad de la especificación, eliminando redundancias en la infraestructura y superestructura para hacer el estándar más accesible.</text:p>
        </text:list-item>
        <text:list-item>
          <text:p text:style-name="P3">El escenario actual (Años 2020 a 2026): * UML como "Bosquejo" (<text:span text:style-name="T1">Sketch</text:span>) vs. Código: En el desarrollo de software moderno (Agile, Scrum, DevOps), el uso de UML migró drásticamente de ser un "Plano Detallado" (propenso a quedar obsoleto) a una herramienta de comunicación rápida.</text:p>
          <text:list>
            <text:list-item>
              <text:p text:style-name="P3">Docs-as-Code: Herramientas visuales tradicionales como <text:span text:style-name="T1">Visual Paradigm</text:span> conviven hoy fuertemente con enfoques de texto a diagrama (como <text:span text:style-name="T1">PlantUML</text:span> o <text:span text:style-name="T1">Mermaid.js</text:span>), donde los diagramas se versionan en Git junto al código fuente.</text:p>
            </text:list-item>
            <text:list-item>
              <text:p text:style-name="P3">Integración con Arquitectura de Microservicios: UML sigue siendo vital, pero su enfoque cambió: hoy se usa menos para modelar la lógica interna de una clase y mucho más para definir contratos de API, flujos de eventos asincrónicos (diagramas de actividad) y topologías de despliegue en la nube (diagramas de despliegue).</text:p>
            </text:list-item>
          </text:list>
        </text:list-item>
      </text:list>
      <text:h text:style-name="Heading_20_2" text:outline-level="2">Actividad C: Resumen Estructurado de Conceptos Clave (Enfoque Visual Paradigm)</text:h>
      <text:p text:style-name="Text_20_body">Basado en las guías oficiales de Visual Paradigm y los pilares del desarrollo de software, aquí tenés el resumen conciso y estructurado para discutir con tus compañeros.</text:p>
      <text:h text:style-name="Heading_20_3" text:outline-level="3"><text:soft-page-break/>1. Clasificación Fundamental de UML</text:h>
      <text:p text:style-name="P1">UML se divide estrictamente en dos grandes familias de diagramas, mapeando la estructura estática y el comportamiento dinámico del sistema.</text:p>
      <text:p text:style-name="P4"/>
      <text:p text:style-name="P4"><draw:frame draw:style-name="fr1" draw:name="Imagen1" text:anchor-type="char" svg:width="17cm" svg:height="6.69cm" draw:z-index="0"><draw:image xlink:href="Pictures/10000001000002D40000011D7847167D.png" xlink:type="simple" xlink:show="embed" xlink:actuate="onLoad" draw:mime-type="image/png"/></draw:frame></text:p>
      <text:p text:style-name="P4"/>
      <text:p text:style-name="P4"/>
      <text:h text:style-name="P5" text:outline-level="3">2. Diagramas Estructurales (El "Quiénes somos")</text:h>
      <text:h text:style-name="P6" text:outline-level="4">A. Diagrama de Clases</text:h>
      <text:p text:style-name="P7">Es la columna vertebral del diseño orientado a objetos. Modela las plantillas del sistema y cómo se descubren entre sí.</text:p>
      <text:list text:style-name="L2">
        <text:list-item>
          <text:p text:style-name="P8">Elementos clave: Clases (Atributos y Métodos), Interfaces.</text:p>
        </text:list-item>
        <text:list-item>
          <text:p text:style-name="P8">Relaciones cruciales:</text:p>
          <text:list>
            <text:list-item>
              <text:p text:style-name="P8">Asociación: Relación estructural básica (una línea).</text:p>
            </text:list-item>
            <text:list-item>
              <text:p text:style-name="P8">Agregación ($\diamondsuit$): Relación "todo-parte" débil. La parte puede existir sin el todo (ej. <text:span text:style-name="T1">Docente</text:span> y <text:span text:style-name="T1">Centro Educativo</text:span>).</text:p>
            </text:list-item>
            <text:list-item>
              <text:p text:style-name="P8">Composición ($\blacklozenge$): Relación "todo-parte" fuerte, con dependencia de ciclo de vida. Si el todo se destruye, la parte también (ej. <text:span text:style-name="T1">Base de Datos</text:span> y <text:span text:style-name="T1">Tablas</text:span>).</text:p>
            </text:list-item>
            <text:list-item>
              <text:p text:style-name="P8">Herencia / Generalización ($\vartriangle$): Relación de especialización (<text:span text:style-name="T1">es un</text:span>).</text:p>
            </text:list-item>
          </text:list>
        </text:list-item>
      </text:list>
      <text:h text:style-name="P6" text:outline-level="4">B. Diagrama de Componentes y Despliegue</text:h>
      <text:list text:style-name="L3">
        <text:list-item>
          <text:p text:style-name="P9"><text:span text:style-name="T2">Componentes: Define módulos de software independientes (ej. un archivo </text:span><text:span text:style-name="Source_20_Text"><text:span text:style-name="T2">.jar</text:span></text:span><text:span text:style-name="T2">, una API, un módulo frontend) y sus interfaces de comunicación.</text:span></text:p>
        </text:list-item>
        <text:list-item>
          <text:p text:style-name="P10">Despliegue: Muestra la arquitectura física (hardware y nodos de red) donde se ejecuta el software (ej. servidores, contenedores Docker, bases de datos físicas).</text:p>
        </text:list-item>
      </text:list>
      <text:h text:style-name="P11" text:outline-level="3"><text:soft-page-break/>3. Diagramas de Comportamiento (El "Cómo actuamos")</text:h>
      <text:h text:style-name="P6" text:outline-level="4">A. Diagrama de Casos de Uso</text:h>
      <text:p text:style-name="P7">Modela el sistema desde la perspectiva externa (caja negra). Es la frontera entre los requerimientos funcionales y el sistema.</text:p>
      <text:list text:style-name="L4">
        <text:list-item>
          <text:p text:style-name="P12">Actor: Entidad externa (humano o sistema) que interactúa con la aplicación.</text:p>
        </text:list-item>
        <text:list-item>
          <text:p text:style-name="P12">Caso de Uso: Secuencia de acciones que produce un resultado de valor medible para el actor.</text:p>
        </text:list-item>
        <text:list-item>
          <text:p text:style-name="P13"><text:span text:style-name="T2">Relaciones: </text:span><text:span text:style-name="Source_20_Text"><text:span text:style-name="T2">«include»</text:span></text:span><text:span text:style-name="T2"> (obligatorio, fragmento de comportamiento común) e </text:span><text:span text:style-name="Source_20_Text"><text:span text:style-name="T2">«exclude»</text:span></text:span><text:span text:style-name="T2"> u </text:span><text:span text:style-name="Source_20_Text"><text:span text:style-name="T2">«extend»</text:span></text:span><text:span text:style-name="T2"> (condicional, flujo alternativo).</text:span></text:p>
        </text:list-item>
      </text:list>
      <text:h text:style-name="P6" text:outline-level="4">B. Diagrama de Secuencia</text:h>
      <text:p text:style-name="P7">Muestra la interacción dinámica de los objetos a lo largo del tiempo, detallando el intercambio de mensajes en un escenario específico.</text:p>
      <text:list text:style-name="L5">
        <text:list-item>
          <text:p text:style-name="P14">Línea de Vida (<text:span text:style-name="T1">Lifeline</text:span>): Representa la existencia del objeto en el tiempo.</text:p>
        </text:list-item>
        <text:list-item>
          <text:p text:style-name="P14">Mensajes: Sincrónicos (flecha rellena), Asincrónicos (flecha abierta) y de Retorno (línea punteada).</text:p>
        </text:list-item>
        <text:list-item>
          <text:p text:style-name="P15"><text:span text:style-name="T2">Fragmentos Combinados (UML 2.0+): </text:span><text:span text:style-name="Source_20_Text"><text:span text:style-name="T2">alt</text:span></text:span><text:span text:style-name="T2"> (lógica if/else), </text:span><text:span text:style-name="Source_20_Text"><text:span text:style-name="T2">loop</text:span></text:span><text:span text:style-name="T2"> (bucles) y </text:span><text:span text:style-name="Source_20_Text"><text:span text:style-name="T2">opt</text:span></text:span><text:span text:style-name="T2"> (opcional).</text:span></text:p>
        </text:list-item>
      </text:list>
      <text:h text:style-name="P6" text:outline-level="4">C. Diagrama de Actividades</text:h>
      <text:p text:style-name="P7">Representa los flujos de trabajo (<text:span text:style-name="T1">workflows</text:span>) de forma procedimental o algorítmica. Es el equivalente estructurado a un diagrama de flujo tradicional, pero potenciado.</text:p>
      <text:list text:style-name="L6">
        <text:list-item>
          <text:p text:style-name="P16">Conceptos clave: Bifurcaciones (<text:span text:style-name="T1">Decision nodes</text:span>), uniones, y barras de Fork y Join para modelar concurrencia y paralelismo.</text:p>
        </text:list-item>
      </text:list>
      <text:p text:style-name="P4"/>
      <text:p text:style-name="P4"/>
      <text:list text:style-name="L7">
        <text:list-item>
          <text:p text:style-name="P17">¿Vale la pena modelar todo con UML antes de programar, o es mejor usarlo como boceto rápido en una pizarra para aclarar ideas de diseño con el equipo?</text:p>
        </text:list-item>
      </text:list>
      <text:list text:style-name="L8">
        <text:list-item>
          <text:p text:style-name="P18">¿Cómo impacta mantener la sincronización entre el diagrama de clases de Visual Paradigm y nuestro repositorio de código real cuando el proyecto empieza a iterar rápido?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4T22:29:22.350527700</meta:creation-date>
    <dc:date>2026-06-24T22:32:45.584574400</dc:date>
    <meta:editing-duration>PT3M23S</meta:editing-duration>
    <meta:editing-cycles>1</meta:editing-cycles>
    <meta:document-statistic meta:table-count="0" meta:image-count="1" meta:object-count="0" meta:page-count="3" meta:paragraph-count="42" meta:word-count="834" meta:character-count="5344" meta:non-whitespace-character-count="4574"/>
    <meta:generator>LibreOffice/25.8.7.3$Windows_X86_64 LibreOffice_project/30742500f2d3eb4366ac312fa33d3dcabdb3eba5</meta:generator>
  </office:meta>
</office:document-meta>
</file>