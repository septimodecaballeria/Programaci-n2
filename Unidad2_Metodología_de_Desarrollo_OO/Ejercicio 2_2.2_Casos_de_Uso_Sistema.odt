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18000004B01DD08F9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keep-with-next="auto"/>
    </style:style>
    <style:style style:name="Tabla1.A" style:family="table-column">
      <style:table-column-properties style:column-width="4.602cm"/>
    </style:style>
    <style:style style:name="Tabla1.B" style:family="table-column">
      <style:table-column-properties style:column-width="12.398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a2" style:family="table" style:master-page-name="">
      <style:table-properties style:width="17cm" style:page-number="auto" fo:break-before="auto" fo:break-after="auto" table:align="left" fo:keep-with-next="auto"/>
    </style:style>
    <style:style style:name="Tabla2.A" style:family="table-column">
      <style:table-column-properties style:column-width="4.637cm"/>
    </style:style>
    <style:style style:name="Tabla2.B" style:family="table-column">
      <style:table-column-properties style:column-width="12.363cm"/>
    </style:style>
    <style:style style:name="Tabla2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a3" style:family="table" style:master-page-name="">
      <style:table-properties style:width="17cm" style:page-number="auto" fo:break-before="auto" fo:break-after="auto" table:align="left" fo:keep-with-next="auto"/>
    </style:style>
    <style:style style:name="Tabla3.A" style:family="table-column">
      <style:table-column-properties style:column-width="4.568cm"/>
    </style:style>
    <style:style style:name="Tabla3.B" style:family="table-column">
      <style:table-column-properties style:column-width="12.432cm"/>
    </style:style>
    <style:style style:name="Tabla3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Tabla4" style:family="table" style:master-page-name="">
      <style:table-properties style:width="17cm" style:page-number="auto" fo:break-before="auto" fo:break-after="auto" table:align="left" fo:keep-with-next="auto"/>
    </style:style>
    <style:style style:name="Tabla4.A" style:family="table-column">
      <style:table-column-properties style:column-width="4.505cm"/>
    </style:style>
    <style:style style:name="Tabla4.B" style:family="table-column">
      <style:table-column-properties style:column-width="12.495cm"/>
    </style:style>
    <style:style style:name="Tabla4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Heading_20_2"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3"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Google Sans Text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Google Sans Tex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/>
    </style:style>
    <style:style style:name="T1" style:family="text">
      <style:text-properties style:font-name="Google Sans Text"/>
    </style:style>
    <style:style style:name="T2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1f1f1f" loext:opacity="100%" style:font-name="Google Sans Text" loext:padding="0cm" loext:border="none"/>
    </style:style>
    <style:style style:name="T4" style:family="text">
      <style:text-properties fo:font-weight="bold"/>
    </style:style>
    <style:style style:name="T5" style:family="text">
      <style:text-properties loext:padding="0cm" loext:border="none"/>
    </style:style>
    <style:style style:name="T6" style:family="text">
      <style:text-properties fo:font-weight="bold" loext:padding="0cm" loext:border="none"/>
    </style:style>
    <style:style style:name="T7" style:family="text">
      <style:text-properties style:font-name="Google Sans Text" loext:padding="0cm" loext:border="none"/>
    </style:style>
    <style:style style:name="T8" style:family="text">
      <style:text-properties style:font-name="Google Sans Text" fo:font-weight="bold" loext:padding="0cm" loext:border="none"/>
    </style:style>
    <style:style style:name="T9" style:family="text">
      <style:text-properties fo:color="#1f1f1f" loext:opacity="100%" style:font-name="Google Sans Text" style:font-name-asian="Google Sans Text" style:font-name-complex="Google Sans Tex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) Identificación y Diagrama de Casos de Uso</text:h>
      <text:p text:style-name="P2"><text:bookmark text:name="p-rc_2f6d99437c0c7b0c-85"/>A partir de las clases candidatas y la justificación del dominio (altas, modificaciones, bajas de productos, ventas, verificación de disponibilidad y validación de tarjetas), identificamos los siguientes Casos de Uso: </text:p>
      <text:list text:style-name="L1">
        <text:list-item>
          <text:p text:style-name="P3"><text:bookmark text:name="p-rc_2f6d99437c0c7b0c-86"/>Actores: Dueño , Vendedor , Cliente (Actor secundario/externo) , Pasarela de Pagos (Actor secundario del sistema). </text:p>
        </text:list-item>
        <text:list-item>
          <text:p text:style-name="P3">Casos de Uso:</text:p>
          <text:list>
            <text:list-item>
              <text:p text:style-name="P4"><text:bookmark text:name="p-rc_2f6d99437c0c7b0c-87"/><text:span text:style-name="Source_20_Text"><text:span text:style-name="T1">CU01</text:span></text:span><text:span text:style-name="T1">: Gestionar Producto (Alta/Modificación/Baja) </text:span></text:p>
            </text:list-item>
            <text:list-item>
              <text:p text:style-name="P4"><text:bookmark text:name="p-rc_2f6d99437c0c7b0c-88"/><text:span text:style-name="Source_20_Text"><text:span text:style-name="T1">CU02</text:span></text:span><text:span text:style-name="T1">: Registrar Venta </text:span></text:p>
            </text:list-item>
            <text:list-item>
              <text:p text:style-name="P4"><text:bookmark text:name="p-rc_2f6d99437c0c7b0c-89"/><text:span text:style-name="Source_20_Text"><text:span text:style-name="T1">CU03</text:span></text:span><text:span text:style-name="T1">: Verificar Disponibilidad de Inventario (</text:span><text:span text:style-name="Source_20_Text"><text:span text:style-name="T1">«include»</text:span></text:span><text:span text:style-name="T1"> por CU02) </text:span></text:p>
            </text:list-item>
            <text:list-item>
              <text:p text:style-name="P4"><text:bookmark text:name="p-rc_2f6d99437c0c7b0c-90"/><text:span text:style-name="Source_20_Text"><text:span text:style-name="T1">CU04</text:span></text:span><text:span text:style-name="T1">: Procesar Pago con Tarjeta (</text:span><text:span text:style-name="Source_20_Text"><text:span text:style-name="T1">«extend»</text:span></text:span><text:span text:style-name="T1"> en CU02) </text:span></text:p>
              <text:p text:style-name="P5"/>
            </text:list-item>
          </text:list>
        </text:list-item>
      </text:list>
      <text:p text:style-name="Standard">Diagrama de Casos de Uso</text:p>
      <text:p text:style-name="Standard"/>
      <text:p text:style-name="Standard"/>
      <text:p text:style-name="Standard"/>
      <text:p text:style-name="Standard"><draw:frame draw:style-name="fr1" draw:name="Imagen1" text:anchor-type="char" svg:width="17cm" svg:height="8.763cm" draw:z-index="0"><draw:image xlink:href="Pictures/1000000000000918000004B01DD08F9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2"><text:soft-page-break/>d) Escenarios Principales (Flujo Feliz)</text:h>
      <text:h text:style-name="P6" text:outline-level="3">CU01: Gestionar Producto</text:h>
      <text:list text:style-name="L2">
        <text:list-item>
          <text:p text:style-name="P7"><text:bookmark text:name="p-rc_2f6d99437c0c7b0c-156"/>El Dueño selecciona la opción de agregar o modificar un producto. </text:p>
        </text:list-item>
        <text:list-item>
          <text:p text:style-name="P7"><text:bookmark text:name="p-rc_2f6d99437c0c7b0c-157"/>El sistema solicita los datos (Código ID, Descripción, Precio de costo). </text:p>
        </text:list-item>
        <text:list-item>
          <text:p text:style-name="P7"><text:bookmark text:name="p-rc_2f6d99437c0c7b0c-158"/>El Dueño ingresa la información requerida. </text:p>
        </text:list-item>
        <text:list-item>
          <text:p text:style-name="P7"><text:bookmark text:name="p-rc_2f6d99437c0c7b0c-159"/>El sistema almacena o actualiza el registro de manera persistente y confirma el éxito. </text:p>
        </text:list-item>
      </text:list>
      <text:h text:style-name="P6" text:outline-level="3">CU02: Registrar Venta</text:h>
      <text:list text:style-name="L3">
        <text:list-item>
          <text:p text:style-name="P8"><text:bookmark text:name="p-rc_2f6d99437c0c7b0c-160"/>El Vendedor inicia una nueva transacción comercial. </text:p>
        </text:list-item>
        <text:list-item>
          <text:p text:style-name="P8"><text:bookmark text:name="p-rc_2f6d99437c0c7b0c-161"/>El sistema solicita la identificación del Cliente (Cédula o RUC) y los productos. </text:p>
        </text:list-item>
        <text:list-item>
          <text:p text:style-name="P8"><text:bookmark text:name="p-rc_2f6d99437c0c7b0c-162"/>El Vendedor ingresa el identificador del Cliente y agrega los productos elegidos. </text:p>
        </text:list-item>
        <text:list-item>
          <text:p text:style-name="P9"><text:bookmark text:name="p-rc_2f6d99437c0c7b0c-163"/><text:span text:style-name="T2">El sistema verifica automáticamente la disponibilidad de los productos en el inventario (</text:span><text:span text:style-name="Source_20_Text"><text:span text:style-name="T2">«include»</text:span></text:span><text:span text:style-name="T2">). </text:span></text:p>
        </text:list-item>
        <text:list-item>
          <text:p text:style-name="P8"><text:bookmark text:name="p-rc_2f6d99437c0c7b0c-164"/>El sistema calcula el total de la venta, registra la transacción con su fecha y hora, e imprime el comprobante. </text:p>
        </text:list-item>
      </text:list>
      <text:h text:style-name="P6" text:outline-level="3">CU03: Verificar Disponibilidad de Inventario</text:h>
      <text:list text:style-name="L4">
        <text:list-item>
          <text:p text:style-name="P10"><text:bookmark text:name="p-rc_2f6d99437c0c7b0c-165"/>El sistema recibe la lista de productos solicitados en la venta. </text:p>
        </text:list-item>
        <text:list-item>
          <text:p text:style-name="P10"><text:bookmark text:name="p-rc_2f6d99437c0c7b0c-166"/>El sistema consulta de manera interna la lista de productos disponibles en el inventario. </text:p>
        </text:list-item>
        <text:list-item>
          <text:p text:style-name="P10"><text:bookmark text:name="p-rc_2f6d99437c0c7b0c-167"/>El sistema valida que cada ítem solicitado cuente con disponibilidad activa. </text:p>
        </text:list-item>
        <text:list-item>
          <text:p text:style-name="P10">El sistema retorna la confirmación de estado positivo al flujo solicitante.</text:p>
        </text:list-item>
      </text:list>
      <text:h text:style-name="P6" text:outline-level="3">CU04: Procesar Pago con Tarjeta</text:h>
      <text:list text:style-name="L5">
        <text:list-item>
          <text:p text:style-name="P11"><text:bookmark text:name="p-rc_2f6d99437c0c7b0c-168"/>El sistema deriva el flujo al detectar que el método de pago elegido es tarjeta de crédito. </text:p>
        </text:list-item>
        <text:list-item>
          <text:p text:style-name="P11"><text:bookmark text:name="p-rc_2f6d99437c0c7b0c-169"/>El sistema solicita los datos de la tarjeta (Número, Emisor). </text:p>
        </text:list-item>
        <text:list-item>
          <text:p text:style-name="P11"><text:bookmark text:name="p-rc_2f6d99437c0c7b0c-170"/>El Cliente proporciona la tarjeta y el sistema envía los datos a la Pasarela de Pagos externa. </text:p>
        </text:list-item>
        <text:list-item>
          <text:p text:style-name="P11"><text:bookmark text:name="p-rc_2f6d99437c0c7b0c-171"/>La Pasarela de Pagos procesa la solicitud, emite la autorización correspondiente y el sistema registra el estado validado.</text:p>
        </text:list-item>
      </text:list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e) Desarrollo Expandido (Fichas de Casos de Uso)</text:h>
      <text:h text:style-name="P13" text:outline-level="3">Ficha CU01: Gestionar Producto</text:h>
      <text:p text:style-name="Standard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4"><text:span text:style-name="Strong_20_Emphasis"><text:span text:style-name="T3">Campo</text:span></text:span></text:p>
            </table:table-cell>
            <table:table-cell table:style-name="Tabla1.A1" office:value-type="string">
              <text:p text:style-name="P14"><text:span text:style-name="Strong_20_Emphasis"><text:span text:style-name="T3">Detalle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5">ID y Nombre:</text:p>
          </table:table-cell>
          <table:table-cell table:style-name="Tabla1.A1" office:value-type="string">
            <text:p text:style-name="P15">CU01: Gestionar Producto</text:p>
          </table:table-cell>
        </table:table-row>
        <table:table-row>
          <table:table-cell table:style-name="Tabla1.A1" office:value-type="string">
            <text:p text:style-name="P15">Actores:</text:p>
          </table:table-cell>
          <table:table-cell table:style-name="Tabla1.A1" office:value-type="string">
            <text:p text:style-name="P16"><text:bookmark text:name="p-rc_2f6d99437c0c7b0c-172"/><text:span text:style-name="T4">Principal:</text:span> Dueño </text:p>
          </table:table-cell>
        </table:table-row>
        <table:table-row>
          <table:table-cell table:style-name="Tabla1.A1" office:value-type="string">
            <text:p text:style-name="P15">Precondiciones:</text:p>
          </table:table-cell>
          <table:table-cell table:style-name="Tabla1.A1" office:value-type="string">
            <text:p text:style-name="P17"><text:bookmark text:name="p-rc_2f6d99437c0c7b0c-173"/><text:span text:style-name="T5">El Dueño se encuentra autenticado con las credenciales y rol correspondiente.</text:span> </text:p>
          </table:table-cell>
        </table:table-row>
        <table:table-row>
          <table:table-cell table:style-name="Tabla1.A1" office:value-type="string">
            <text:p text:style-name="P15">Poscondiciones:</text:p>
          </table:table-cell>
          <table:table-cell table:style-name="Tabla1.A1" office:value-type="string">
            <text:p text:style-name="P17"><text:bookmark text:name="p-rc_2f6d99437c0c7b0c-174"/><text:span text:style-name="T5">El producto queda guardado, modificado o marcado como inactivo (borrado lógico) en el sistema.</text:span> </text:p>
          </table:table-cell>
        </table:table-row>
        <table:table-row>
          <table:table-cell table:style-name="Tabla1.A1" office:value-type="string">
            <text:p text:style-name="P15">Inclusiones / Extensiones:</text:p>
          </table:table-cell>
          <table:table-cell table:style-name="Tabla1.A1" office:value-type="string">
            <text:p text:style-name="P18">Ninguna.</text:p>
          </table:table-cell>
        </table:table-row>
        <table:table-row>
          <table:table-cell table:style-name="Tabla1.A1" office:value-type="string">
            <text:p text:style-name="P15">Flujo Principal:</text:p>
          </table:table-cell>
          <table:table-cell table:style-name="Tabla1.A1" office:value-type="string">
            <text:p text:style-name="P17"><text:bookmark text:name="p-rc_2f6d99437c0c7b0c-175"/><text:span text:style-name="T6">1.</text:span><text:span text:style-name="T5"> El Dueño selecciona la opción de gestión de productos (Alta/Modificación/Baja) .</text:span> </text:p>
            <text:p text:style-name="P17"><text:bookmark text:name="p-rc_2f6d99437c0c7b0c-176"/><text:span text:style-name="T6">2.</text:span><text:span text:style-name="T5"> El sistema solicita el Código ID del producto .</text:span> </text:p>
            <text:p text:style-name="P17"><text:bookmark text:name="p-rc_2f6d99437c0c7b0c-177"/><text:span text:style-name="T6">3.</text:span><text:span text:style-name="T5"> El Dueño digita el Código ID .</text:span> </text:p>
            <text:p text:style-name="P17"><text:bookmark text:name="p-rc_2f6d99437c0c7b0c-178"/><text:span text:style-name="T6">4.</text:span><text:span text:style-name="T5"> El sistema recupera los datos actuales o habilita los campos vacíos (Descripción, Precio) .</text:span> </text:p>
            <text:p text:style-name="P17"><text:bookmark text:name="p-rc_2f6d99437c0c7b0c-179"/><text:span text:style-name="T6">5.</text:span><text:span text:style-name="T5"> El Dueño introduce los nuevos datos o confirma la baja .</text:span> </text:p>
            <text:p text:style-name="P17"><text:bookmark text:name="p-rc_2f6d99437c0c7b0c-180"/><text:span text:style-name="T6">6.</text:span><text:span text:style-name="T5"> El sistema valida que los campos sean correctos y confirma la operación de manera persistente.</text:span> </text:p>
          </table:table-cell>
        </table:table-row>
        <table:table-row>
          <table:table-cell table:style-name="Tabla1.A1" office:value-type="string">
            <text:p text:style-name="P15">Flujos Alternativos:</text:p>
          </table:table-cell>
          <table:table-cell table:style-name="Tabla1.A1" office:value-type="string">
            <text:p text:style-name="P19">3.a. El Código ID no existe (en Modificación/Baja):</text:p>
            <text:p text:style-name="P17">1. El sistema emite un mensaje de error notificando la inexistencia.</text:p>
            <text:p text:style-name="P17">2. Se cancela la operación.</text:p>
            <text:p text:style-name="P19">5.a. Operación de Baja (Borrado Lógico):</text:p>
            <text:p text:style-name="P20"><text:bookmark text:name="p-rc_2f6d99437c0c7b0c-181"/><text:span text:style-name="T5">    </text:span><text:span text:style-name="T7">1. El Dueño selecciona "Dar de baja".</text:span><text:span text:style-name="T1"> </text:span></text:p>
            <text:p text:style-name="P20"><text:bookmark text:name="p-rc_2f6d99437c0c7b0c-182"/><text:span text:style-name="T5">    </text:span><text:span text:style-name="T7">2. El sistema cambia el estado del producto a "Inactivo" para preservar el historial de ventas previas.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icha CU02: Registrar Venta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4"><text:span text:style-name="Strong_20_Emphasis"><text:span text:style-name="T3">Campo</text:span></text:span></text:p>
            </table:table-cell>
            <table:table-cell table:style-name="Tabla2.A1" office:value-type="string">
              <text:p text:style-name="P14"><text:span text:style-name="Strong_20_Emphasis"><text:span text:style-name="T3">Detalle</text:span></text:span></text:p>
            </table:table-cell>
          </table:table-row>
        </table:table-header-rows>
        <table:table-row>
          <table:table-cell table:style-name="Tabla2.A1" office:value-type="string">
            <text:p text:style-name="P15">ID y Nombre:</text:p>
          </table:table-cell>
          <table:table-cell table:style-name="Tabla2.A1" office:value-type="string">
            <text:p text:style-name="P15">CU02: Registrar Venta</text:p>
          </table:table-cell>
        </table:table-row>
        <table:table-row>
          <table:table-cell table:style-name="Tabla2.A1" office:value-type="string">
            <text:p text:style-name="P15">Actores:</text:p>
          </table:table-cell>
          <table:table-cell table:style-name="Tabla2.A1" office:value-type="string">
            <text:p text:style-name="P17"><text:bookmark text:name="p-rc_2f6d99437c0c7b0c-183"/><text:span text:style-name="T6">Principal:</text:span><text:span text:style-name="T5"> Vendedor | </text:span><text:span text:style-name="T6">Secundario:</text:span><text:span text:style-name="T5"> Cliente </text:span></text:p>
          </table:table-cell>
        </table:table-row>
        <table:table-row>
          <table:table-cell table:style-name="Tabla2.A1" office:value-type="string">
            <text:p text:style-name="P15">Precondiciones:</text:p>
          </table:table-cell>
          <table:table-cell table:style-name="Tabla2.A1" office:value-type="string">
            <text:p text:style-name="P17"><text:bookmark text:name="p-rc_2f6d99437c0c7b0c-184"/><text:span text:style-name="T5">El Vendedor se encuentra autenticado en el sistema.</text:span> </text:p>
          </table:table-cell>
        </table:table-row>
        <table:table-row>
          <table:table-cell table:style-name="Tabla2.A1" office:value-type="string">
            <text:p text:style-name="P15">Poscondiciones:</text:p>
          </table:table-cell>
          <table:table-cell table:style-name="Tabla2.A1" office:value-type="string">
            <text:p text:style-name="P17"><text:bookmark text:name="p-rc_2f6d99437c0c7b0c-185"/><text:span text:style-name="T5">La venta se registra con fecha/hora y los productos se vinculan definitivamente al cliente.</text:span> </text:p>
          </table:table-cell>
        </table:table-row>
        <table:table-row>
          <table:table-cell table:style-name="Tabla2.A1" office:value-type="string">
            <text:p text:style-name="P15">Inclusiones / Extensiones:</text:p>
          </table:table-cell>
          <table:table-cell table:style-name="Tabla2.A1" office:value-type="string">
            <text:p text:style-name="P16"><text:bookmark text:name="p-rc_2f6d99437c0c7b0c-186"/><text:span text:style-name="T4">«include»</text:span>: CU03 (Verificar Disponibilidad de Inventario) </text:p>
            <text:p text:style-name="P16"><text:bookmark text:name="p-rc_2f6d99437c0c7b0c-187"/><text:span text:style-name="T4">«extend»</text:span>: CU04 (Procesar Pago con Tarjeta) </text:p>
          </table:table-cell>
        </table:table-row>
        <table:table-row>
          <table:table-cell table:style-name="Tabla2.A1" office:value-type="string">
            <text:p text:style-name="P15">Flujo Principal:</text:p>
          </table:table-cell>
          <table:table-cell table:style-name="Tabla2.A1" office:value-type="string">
            <text:p text:style-name="P17"><text:bookmark text:name="p-rc_2f6d99437c0c7b0c-188"/><text:span text:style-name="T6">1.</text:span><text:span text:style-name="T5"> El Vendedor inicia una nueva transacción de venta .</text:span> </text:p>
            <text:p text:style-name="P17"><text:bookmark text:name="p-rc_2f6d99437c0c7b0c-189"/><text:span text:style-name="T6">2.</text:span><text:span text:style-name="T5"> El sistema solicita el documento de identidad del Cliente .</text:span> </text:p>
            <text:p text:style-name="P17"><text:bookmark text:name="p-rc_2f6d99437c0c7b0c-190"/><text:span text:style-name="T6">3.</text:span><text:span text:style-name="T5"> El Vendedor ingresa la Cédula o RUC del Cliente .</text:span> </text:p>
            <text:p text:style-name="P17"><text:bookmark text:name="p-rc_2f6d99437c0c7b0c-191"/><text:span text:style-name="T6">4.</text:span><text:span text:style-name="T5"> El Vendedor ingresa secuencialmente los Códigos ID de los productos .</text:span> </text:p>
            <text:p text:style-name="P17"><text:bookmark text:name="p-rc_2f6d99437c0c7b0c-192"/><text:span text:style-name="T6">5.</text:span><text:span text:style-name="T5"> El sistema ejecuta la inclusión obligatoria </text:span><text:span text:style-name="T6">CU03</text:span><text:span text:style-name="T5"> para asegurar que haya stock de cada producto .</text:span> </text:p>
            <text:p text:style-name="P17"><text:bookmark text:name="p-rc_2f6d99437c0c7b0c-193"/><text:span text:style-name="T6">6.</text:span><text:span text:style-name="T5"> El sistema calcula el monto total acumulado sumando los precios vigentes .</text:span> </text:p>
            <text:p text:style-name="P17"><text:span text:style-name="T6">7.</text:span><text:span text:style-name="T5"> El Vendedor selecciona pago en efectivo.</text:span></text:p>
            <text:p text:style-name="P17"><text:bookmark text:name="p-rc_2f6d99437c0c7b0c-194"/><text:span text:style-name="T6">8.</text:span><text:span text:style-name="T5"> El sistema registra la venta con la fecha/hora actual y emite el comprobante de pago.</text:span> </text:p>
          </table:table-cell>
        </table:table-row>
        <table:table-row>
          <table:table-cell table:style-name="Tabla2.A1" office:value-type="string">
            <text:p text:style-name="P15">Flujos Alternativos:</text:p>
          </table:table-cell>
          <table:table-cell table:style-name="Tabla2.A1" office:value-type="string">
            <text:p text:style-name="P19">5.a. El sistema detecta falta de disponibilidad en algún producto:</text:p>
            <text:p text:style-name="P20"><text:bookmark text:name="p-rc_2f6d99437c0c7b0c-195"/><text:span text:style-name="T5">    </text:span><text:span text:style-name="T7">1. El sistema muestra un mensaje indicando qué producto no cuenta con stock disponible.</text:span><text:span text:style-name="T1"> </text:span></text:p>
            <text:p text:style-name="P17">2. El Vendedor puede quitar dicho producto de la lista o cancelar la transacción.</text:p>
            <text:p text:style-name="P19">7.a. El Cliente decide abonar utilizando Tarjeta de Crédito:</text:p>
            <text:p text:style-name="P20"><text:bookmark text:name="p-rc_2f6d99437c0c7b0c-196"/><text:span text:style-name="T5">    </text:span><text:span text:style-name="T7">1. El sistema ejecuta el punto de extensión </text:span><text:span text:style-name="T8">CU04</text:span><text:span text:style-name="T7">.</text:span><text:span text:style-name="T1"> </text:span></text:p>
            <text:p text:style-name="P20"><text:bookmark text:name="p-rc_2f6d99437c0c7b0c-197"/><text:span text:style-name="T5">    </text:span><text:span text:style-name="T7">2. Al recibir una validación exitosa de la tarjeta, el flujo retoma en el paso 8.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Ficha CU03: Verificar Disponibilidad de Inventario</text:p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14"><text:span text:style-name="Strong_20_Emphasis"><text:span text:style-name="T3">Campo</text:span></text:span></text:p>
            </table:table-cell>
            <table:table-cell table:style-name="Tabla3.A1" office:value-type="string">
              <text:p text:style-name="P14"><text:span text:style-name="Strong_20_Emphasis"><text:span text:style-name="T3">Detalle</text:span></text:span></text:p>
            </table:table-cell>
          </table:table-row>
        </table:table-header-rows>
        <table:table-row>
          <table:table-cell table:style-name="Tabla3.A1" office:value-type="string">
            <text:p text:style-name="P15">ID y Nombre:</text:p>
          </table:table-cell>
          <table:table-cell table:style-name="Tabla3.A1" office:value-type="string">
            <text:p text:style-name="P15">CU03: Verificar Disponibilidad de Inventario</text:p>
          </table:table-cell>
        </table:table-row>
        <table:table-row>
          <table:table-cell table:style-name="Tabla3.A1" office:value-type="string">
            <text:p text:style-name="P15">Actores:</text:p>
          </table:table-cell>
          <table:table-cell table:style-name="Tabla3.A1" office:value-type="string">
            <text:p text:style-name="P18"><text:span text:style-name="T4">Principal:</text:span> Sistema (Caso de uso automatizado)</text:p>
          </table:table-cell>
        </table:table-row>
        <table:table-row>
          <table:table-cell table:style-name="Tabla3.A1" office:value-type="string">
            <text:p text:style-name="P15">Precondiciones:</text:p>
          </table:table-cell>
          <table:table-cell table:style-name="Tabla3.A1" office:value-type="string">
            <text:p text:style-name="P17"><text:bookmark text:name="p-rc_2f6d99437c0c7b0c-198"/><text:span text:style-name="T5">Invocado directamente por un proceso de registro de transacciones (como CU02 o CU04).</text:span> </text:p>
          </table:table-cell>
        </table:table-row>
        <table:table-row>
          <table:table-cell table:style-name="Tabla3.A1" office:value-type="string">
            <text:p text:style-name="P15">Poscondiciones:</text:p>
          </table:table-cell>
          <table:table-cell table:style-name="Tabla3.A1" office:value-type="string">
            <text:p text:style-name="P17"><text:bookmark text:name="p-rc_2f6d99437c0c7b0c-199"/><text:span text:style-name="T5">Se determina con precisión si los ítems solicitados se encuentran o no disponibles en stock.</text:span> </text:p>
          </table:table-cell>
        </table:table-row>
        <table:table-row>
          <table:table-cell table:style-name="Tabla3.A1" office:value-type="string">
            <text:p text:style-name="P15">Inclusiones / Extensiones:</text:p>
          </table:table-cell>
          <table:table-cell table:style-name="Tabla3.A1" office:value-type="string">
            <text:p text:style-name="P18">Ninguna.</text:p>
          </table:table-cell>
        </table:table-row>
        <table:table-row>
          <table:table-cell table:style-name="Tabla3.A1" office:value-type="string">
            <text:p text:style-name="P15">Flujo Principal:</text:p>
          </table:table-cell>
          <table:table-cell table:style-name="Tabla3.A1" office:value-type="string">
            <text:p text:style-name="P17"><text:bookmark text:name="p-rc_2f6d99437c0c7b0c-200"/><text:span text:style-name="T6">1.</text:span><text:span text:style-name="T5"> El sistema recibe la lista de identificadores de productos y cantidades .</text:span> </text:p>
            <text:p text:style-name="P17"><text:bookmark text:name="p-rc_2f6d99437c0c7b0c-201"/><text:span text:style-name="T6">2.</text:span><text:span text:style-name="T5"> El sistema interroga a la entidad Inventario para comprobar la existencia física o lógica de cada ítem .</text:span> </text:p>
            <text:p text:style-name="P17"><text:bookmark text:name="p-rc_2f6d99437c0c7b0c-202"/><text:span text:style-name="T6">3.</text:span><text:span text:style-name="T5"> El sistema comprueba que el estado del producto no sea "inactivo" o sin stock .</text:span> </text:p>
            <text:p text:style-name="P17"><text:bookmark text:name="p-rc_2f6d99437c0c7b0c-203"/><text:span text:style-name="T6">4.</text:span><text:span text:style-name="T5"> El sistema retorna una bandera exitosa confirmando que todo está disponible.</text:span> </text:p>
          </table:table-cell>
        </table:table-row>
        <table:table-row>
          <table:table-cell table:style-name="Tabla3.A1" office:value-type="string">
            <text:p text:style-name="P15">Flujos Alternativos:</text:p>
          </table:table-cell>
          <table:table-cell table:style-name="Tabla3.A1" office:value-type="string">
            <text:p text:style-name="P19">3.a. Uno o más productos de la lista no tienen stock o disponibilidad:</text:p>
            <text:p text:style-name="P17">1. El sistema marca los productos en falta.</text:p>
            <text:p text:style-name="P20"><text:bookmark text:name="p-rc_2f6d99437c0c7b0c-204"/><text:span text:style-name="T5">    </text:span><text:span text:style-name="T7">2. Retorna una excepción o código de error informando desabastecimiento al proceso invocador.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icha CU04: Procesar Pago con Tarjeta</text:p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4"><text:span text:style-name="Strong_20_Emphasis"><text:span text:style-name="T3">Campo</text:span></text:span></text:p>
            </table:table-cell>
            <table:table-cell table:style-name="Tabla4.A1" office:value-type="string">
              <text:p text:style-name="P14"><text:span text:style-name="Strong_20_Emphasis"><text:span text:style-name="T3">Detalle</text:span></text:span></text:p>
            </table:table-cell>
          </table:table-row>
        </table:table-header-rows>
        <table:table-row>
          <table:table-cell table:style-name="Tabla4.A1" office:value-type="string">
            <text:p text:style-name="P15">ID y Nombre:</text:p>
          </table:table-cell>
          <table:table-cell table:style-name="Tabla4.A1" office:value-type="string">
            <text:p text:style-name="P15">CU04: Procesar Pago con Tarjeta</text:p>
          </table:table-cell>
        </table:table-row>
        <table:table-row>
          <table:table-cell table:style-name="Tabla4.A1" office:value-type="string">
            <text:p text:style-name="P15">Actores:</text:p>
          </table:table-cell>
          <table:table-cell table:style-name="Tabla4.A1" office:value-type="string">
            <text:p text:style-name="P17"><text:bookmark text:name="p-rc_2f6d99437c0c7b0c-205"/><text:span text:style-name="T6">Principal:</text:span><text:span text:style-name="T5"> Cliente | </text:span><text:span text:style-name="T6">Secundario:</text:span><text:span text:style-name="T5"> Pasarela de Pagos (Banco/Entidad Financiera) </text:span></text:p>
          </table:table-cell>
        </table:table-row>
        <table:table-row>
          <table:table-cell table:style-name="Tabla4.A1" office:value-type="string">
            <text:p text:style-name="P15">Precondiciones:</text:p>
          </table:table-cell>
          <table:table-cell table:style-name="Tabla4.A1" office:value-type="string">
            <text:p text:style-name="P17"><text:bookmark text:name="p-rc_2f6d99437c0c7b0c-206"/><text:span text:style-name="T5">Se requiere un monto total precalculado por la venta en curso.</text:span> </text:p>
          </table:table-cell>
        </table:table-row>
        <table:table-row>
          <table:table-cell table:style-name="Tabla4.A1" office:value-type="string">
            <text:p text:style-name="P15">Poscondiciones:</text:p>
          </table:table-cell>
          <table:table-cell table:style-name="Tabla4.A1" office:value-type="string">
            <text:p text:style-name="P17"><text:bookmark text:name="p-rc_2f6d99437c0c7b0c-207"/><text:span text:style-name="T5">La tarjeta es validada con éxito y se emite el código de autorización financiera correspondiente.</text:span> </text:p>
          </table:table-cell>
        </table:table-row>
        <table:table-row>
          <table:table-cell table:style-name="Tabla4.A1" office:value-type="string">
            <text:p text:style-name="P15">Inclusiones / Extensiones:</text:p>
          </table:table-cell>
          <table:table-cell table:style-name="Tabla4.A1" office:value-type="string">
            <text:p text:style-name="P18">Ninguna.</text:p>
          </table:table-cell>
        </table:table-row>
        <table:table-row>
          <table:table-cell table:style-name="Tabla4.A1" office:value-type="string">
            <text:p text:style-name="P15">Flujo Principal:</text:p>
          </table:table-cell>
          <table:table-cell table:style-name="Tabla4.A1" office:value-type="string">
            <text:p text:style-name="P17"><text:bookmark text:name="p-rc_2f6d99437c0c7b0c-208"/><text:span text:style-name="T6">1.</text:span><text:span text:style-name="T5"> El sistema despliega el formulario de cobranza electrónica .</text:span> </text:p>
            <text:p text:style-name="P17"><text:bookmark text:name="p-rc_2f6d99437c0c7b0c-209"/><text:span text:style-name="T6">2.</text:span><text:span text:style-name="T5"> Se leen o ingresan los datos de la tarjeta (Número, Emisor) .</text:span> </text:p>
            <text:p text:style-name="P17"><text:bookmark text:name="p-rc_2f6d99437c0c7b0c-210"/><text:span text:style-name="T6">3.</text:span><text:span text:style-name="T5"> El sistema emite de forma externa una solicitud de validación y cobro a la Pasarela de Pagos en tiempo real .</text:span> </text:p>
            <text:p text:style-name="P17"><text:bookmark text:name="p-rc_2f6d99437c0c7b0c-211"/><text:span text:style-name="T6">4.</text:span><text:span text:style-name="T5"> La Pasarela de Pagos verifica el formato, fondos y estado de la tarjeta, emitiendo una firma de autorización .</text:span> </text:p>
            <text:p text:style-name="P17"><text:bookmark text:name="p-rc_2f6d99437c0c7b0c-212"/><text:span text:style-name="T6">5.</text:span><text:span text:style-name="T5"> El sistema recibe la aprobación, cambia el estado de validación a aprobado y finaliza la extensión.</text:span> </text:p>
          </table:table-cell>
        </table:table-row>
        <table:table-row>
          <table:table-cell table:style-name="Tabla4.A1" office:value-type="string">
            <text:p text:style-name="P15">Flujos Alternativos:</text:p>
          </table:table-cell>
          <table:table-cell table:style-name="Tabla4.A1" office:value-type="string">
            <text:p text:style-name="P19">4.a. La Pasarela de Pagos deniega la transacción (Fondos insuficientes / Tarjeta vencida o robada):</text:p>
            <text:p text:style-name="P20"><text:bookmark text:name="p-rc_2f6d99437c0c7b0c-213"/><text:span text:style-name="T5">    </text:span><text:span text:style-name="T7">1. El sistema recibe el rechazo de la entidad financiera.</text:span><text:span text:style-name="T1"> </text:span></text:p>
            <text:p text:style-name="P17">2. El sistema notifica al Vendedor el fallo en el pago con tarjeta.</text:p>
            <text:p text:style-name="P17">3. Se cancela la extensión y se solicita cambiar la modalidad de pago en CU02.<text:span text:style-name="T9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22:38:28.474007900</meta:creation-date>
    <dc:date>2026-06-24T22:48:18.512671700</dc:date>
    <meta:editing-duration>PT9M50S</meta:editing-duration>
    <meta:editing-cycles>1</meta:editing-cycles>
    <meta:document-statistic meta:table-count="4" meta:image-count="1" meta:object-count="0" meta:page-count="6" meta:paragraph-count="137" meta:word-count="1113" meta:character-count="7054" meta:non-whitespace-character-count="5980"/>
    <meta:generator>LibreOffice/25.8.7.3$Windows_X86_64 LibreOffice_project/30742500f2d3eb4366ac312fa33d3dcabdb3eba5</meta:generator>
  </office:meta>
</office:document-meta>
</file>