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318000002F49635E56E.png" manifest:media-type="image/png"/>
  <manifest:file-entry manifest:full-path="Pictures/10000000000004F8000002F4F74CE500.png" manifest:media-type="image/png"/>
  <manifest:file-entry manifest:full-path="Pictures/1000000000001670000007D0D7191614.png" manifest:media-type="image/png"/>
  <manifest:file-entry manifest:full-path="Pictures/1000000000000AC1000007D01C65D0A7.png" manifest:media-type="image/png"/>
  <manifest:file-entry manifest:full-path="Pictures/1000000000000F73000007D0D0F1927A.png" manifest:media-type="image/png"/>
  <manifest:file-entry manifest:full-path="Pictures/1000000000000A12000007D0A01D86AE.png" manifest:media-type="image/png"/>
  <manifest:file-entry manifest:full-path="Pictures/1000000000000950000007D06DCF7537.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Google Sans Flex" svg:font-family="'Google Sans Flex', 'Google Sans', 'Helvetica Neue',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1f1f1f" loext:opacity="100%" style:font-name="Google Sans Flex" fo:font-size="12.75pt" fo:letter-spacing="normal" fo:font-style="normal" fo:font-weight="bold" style:font-weight-asian="bold" style:font-weight-complex="bold"/>
    </style:style>
    <style:style style:name="P2"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1f1f1f" loext:opacity="100%" style:font-name="Google Sans Flex" fo:font-size="12.75pt" fo:letter-spacing="normal" fo:font-style="normal" fo:font-weight="normal"/>
    </style:style>
    <style:style style:name="P3"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1f1f1f" loext:opacity="100%" style:font-name="Google Sans Text" fo:font-size="12.75pt" fo:letter-spacing="normal" fo:font-style="normal" fo:font-weight="normal"/>
    </style:style>
    <style:style style:name="P4" style:family="paragraph" style:parent-style-name="Text_20_body">
      <style:paragraph-properties fo:margin-left="0cm" fo:margin-right="0cm" fo:margin-top="0cm" fo:margin-bottom="0.247cm" style:contextual-spacing="false" fo:line-height="114%" fo:text-indent="0cm" style:auto-text-indent="false"/>
      <style:text-properties fo:color="#1f1f1f" loext:opacity="100%" style:font-name="Google Sans Text" fo:font-size="12.75pt"/>
    </style:style>
    <style:style style:name="P5" style:family="paragraph" style:parent-style-name="Text_20_body" style:list-style-name="L1">
      <style:paragraph-properties fo:margin-left="0cm" fo:margin-right="0cm" fo:margin-top="0cm" fo:margin-bottom="0.247cm" style:contextual-spacing="false" fo:line-height="114%" fo:text-indent="0cm" style:auto-text-indent="false" fo:padding="0cm" fo:border="none"/>
      <style:text-properties fo:color="#1f1f1f" loext:opacity="100%" style:font-name="Google Sans Text" fo:font-size="12.75pt"/>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font-weight="bold" officeooo:paragraph-rsid="000e26bb" style:font-weight-asian="bold" style:font-weight-complex="bold"/>
    </style:style>
    <style:style style:name="P8" style:family="paragraph" style:parent-style-name="Standard">
      <style:text-properties fo:font-weight="normal" officeooo:rsid="000e26bb" officeooo:paragraph-rsid="000e26bb" style:font-weight-asian="normal" style:font-weight-complex="normal"/>
    </style:style>
    <style:style style:name="P9" style:family="paragraph" style:parent-style-name="Text_20_body">
      <style:text-properties fo:font-weight="normal" officeooo:rsid="000e26bb" officeooo:paragraph-rsid="000e26bb" style:font-weight-asian="normal" style:font-weight-complex="normal"/>
    </style:style>
    <style:style style:name="P10" style:family="paragraph" style:parent-style-name="Text_20_body" style:list-style-name="L2">
      <style:text-properties officeooo:rsid="000e26bb"/>
    </style:style>
    <style:style style:name="P11" style:family="paragraph" style:parent-style-name="Text_20_body">
      <style:text-properties officeooo:rsid="000e26bb"/>
    </style:style>
    <style:style style:name="P12" style:family="paragraph" style:parent-style-name="Standard">
      <style:text-properties fo:font-weight="bold" officeooo:rsid="000e26bb" officeooo:paragraph-rsid="000e26bb" style:font-weight-asian="bold" style:font-weight-complex="bold"/>
    </style:style>
    <style:style style:name="P13" style:family="paragraph" style:parent-style-name="Text_20_body">
      <style:text-properties fo:font-weight="bold" officeooo:rsid="000e26bb" officeooo:paragraph-rsid="000e26bb" style:font-weight-asian="bold" style:font-weight-complex="bold"/>
    </style:style>
    <style:style style:name="P14" style:family="paragraph" style:parent-style-name="Text_20_body" style:list-style-name="L3">
      <style:text-properties fo:font-weight="bold" officeooo:rsid="000e26bb" style:font-weight-asian="bold" style:font-weight-complex="bold"/>
    </style:style>
    <style:style style:name="P15" style:family="paragraph" style:parent-style-name="Text_20_body" style:list-style-name="L4">
      <style:text-properties fo:font-weight="bold" officeooo:rsid="000e26bb" style:font-weight-asian="bold" style:font-weight-complex="bold"/>
    </style:style>
    <style:style style:name="P16" style:family="paragraph" style:parent-style-name="Text_20_body" style:list-style-name="L5">
      <style:text-properties fo:font-weight="bold" officeooo:rsid="000e26bb" style:font-weight-asian="bold" style:font-weight-complex="bold"/>
    </style:style>
    <style:style style:name="P17" style:family="paragraph" style:parent-style-name="Heading_20_3">
      <style:text-properties fo:font-weight="normal" officeooo:rsid="000e26bb" officeooo:paragraph-rsid="000e26bb" style:font-weight-asian="normal" style:font-weight-complex="normal"/>
    </style:style>
    <style:style style:name="P18" style:family="paragraph" style:parent-style-name="Text_20_body">
      <style:text-properties fo:font-weight="bold" officeooo:rsid="000e26bb" style:font-weight-asian="bold" style:font-weight-complex="bold"/>
    </style:style>
    <style:style style:name="P19" style:family="paragraph" style:parent-style-name="Heading_20_4">
      <style:text-properties fo:font-weight="normal" officeooo:rsid="000e26bb" style:font-weight-asian="normal" style:font-weight-complex="normal"/>
    </style:style>
    <style:style style:name="P20" style:family="paragraph" style:parent-style-name="Standard">
      <style:text-properties fo:font-weight="bold" officeooo:rsid="00101ea4" officeooo:paragraph-rsid="00101ea4" style:font-weight-asian="bold" style:font-weight-complex="bold"/>
    </style:style>
    <style:style style:name="P21" style:family="paragraph" style:parent-style-name="Heading_20_3">
      <style:text-properties fo:font-size="12pt" fo:font-weight="bold" officeooo:rsid="00101ea4" officeooo:paragraph-rsid="00101ea4" style:font-size-asian="12pt" style:font-weight-asian="bold" style:font-size-complex="12pt" style:font-weight-complex="bold"/>
    </style:style>
    <style:style style:name="P22" style:family="paragraph" style:parent-style-name="Text_20_body">
      <style:text-properties fo:font-weight="bold" officeooo:rsid="00101ea4" style:font-weight-asian="bold" style:font-weight-complex="bold"/>
    </style:style>
    <style:style style:name="P23" style:family="paragraph" style:parent-style-name="Text_20_body">
      <style:text-properties fo:font-weight="normal" officeooo:rsid="00101ea4" style:font-weight-asian="normal" style:font-weight-complex="normal"/>
    </style:style>
    <style:style style:name="P24" style:family="paragraph" style:parent-style-name="Text_20_body">
      <style:text-properties fo:font-weight="bold" officeooo:rsid="00101ea4" officeooo:paragraph-rsid="0010c716" style:font-weight-asian="bold" style:font-weight-complex="bold"/>
    </style:style>
    <style:style style:name="P25" style:family="paragraph" style:parent-style-name="Standard">
      <style:text-properties fo:font-weight="normal" officeooo:rsid="00101ea4" officeooo:paragraph-rsid="00101ea4" style:font-weight-asian="normal" style:font-weight-complex="normal"/>
    </style:style>
    <style:style style:name="T1" style:family="text">
      <style:text-properties fo:font-weight="bold"/>
    </style:style>
    <style:style style:name="T2" style:family="text">
      <style:text-properties style:font-weight-asian="normal" style:font-weight-complex="normal"/>
    </style:style>
    <style:style style:name="T3" style:family="text">
      <style:text-properties fo:font-style="italic"/>
    </style:style>
    <style:style style:name="T4" style:family="text">
      <style:text-properties fo:font-weight="normal" officeooo:rsid="000e26bb" style:font-weight-asian="normal" style:font-weight-complex="normal"/>
    </style:style>
    <style:style style:name="T5" style:family="text">
      <style:text-properties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officeooo:rsid="00101ea4"/>
    </style:style>
    <style:style style:name="T8" style:family="text">
      <style:text-properties fo:font-weight="normal" officeooo:rsid="00101ea4" style:font-weight-asian="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Explique brevemente en qué consiste la etapa de Análisis Orientado a Objetos y diga para qué sirve el Diagrama de Clases Conceptual de UML dentro de dicha etapa.</text:p>
      <text:p text:style-name="P2"/>
      <text:p text:style-name="P3"><text:bookmark text:name="p-rc_23a694dc844c6c88-219"/>La etapa de <text:span text:style-name="T1">Análisis Orientado a Objetos</text:span> consiste en investigar, comprender y modelar el dominio del problema. En lugar de pensar en cómo codificar la solución, el analista se enfoca en identificar <text:span text:style-name="T1">qué</text:span> debe hacer el sistema y cuáles son los componentes del mundo real que interactúan en él. </text:p>
      <text:p text:style-name="P4"><text:bookmark text:name="p-rc_23a694dc844c6c88-220"/>Durante esta fase, se examina el negocio o escenario planteado para abstraer los conceptos clave en forma de <text:span text:style-name="T1">clases y objetos</text:span> (los cuales poseen identidad, atributos y comportamientos) , definiendo sus responsabilidades y las relaciones que existen entre ellos sin preocuparse por la tecnología, el lenguaje de programación o la base de datos que se usará más adelante.</text:p>
      <text:p text:style-name="P2"/>
      <text:p text:style-name="P3">El <text:span text:style-name="T2">Diagrama de Clases Conceptual</text:span> (también llamado Modelo de Dominio) es una herramienta de abstracción gráfica en UML que sirve para:</text:p>
      <text:list text:style-name="L1">
        <text:list-item>
          <text:p text:style-name="P5"><text:bookmark text:name="p-rc_23a694dc844c6c88-221"/><text:span text:style-name="T1">Mapear el vocabulario del problema:</text:span> Representa de forma visual los conceptos puros del negocio (clases candidatas como <text:span text:style-name="T3">Producto</text:span>, <text:span text:style-name="T3">Venta</text:span> o <text:span text:style-name="T3">Cliente</text:span>) mediante rectángulos que solo muestran sus atributos esenciales, omitiendo los métodos técnicos de software (como getters, setters o funciones de conexión a bases de datos). </text:p>
        </text:list-item>
        <text:list-item>
          <text:p text:style-name="P5"><text:bookmark text:name="p-rc_23a694dc844c6c88-222"/><text:span text:style-name="T1">Definir las Reglas de Negocio mediante relaciones:</text:span> Permite plasmar visualmente cómo se conectan las entidades entre sí mediante asociaciones, agregaciones, composiciones o herencias (por ejemplo, definir que una <text:span text:style-name="T3">Venta</text:span> vincula obligatoriamente a un <text:span text:style-name="T3">Cliente</text:span> con una lista de <text:span text:style-name="T3">Productos</text:span>) . </text:p>
        </text:list-item>
        <text:list-item>
          <text:p text:style-name="P5"><text:bookmark text:name="p-rc_23a694dc844c6c88-223"/><text:span text:style-name="T1">Establecer un puente de comunicación:</text:span> Sirve como un lenguaje unificado y claro tanto para los desarrolladores como para los usuarios expertos o clientes. Al ser conceptual, evita tecnicismos de implementación y permite validar con el cliente si el diseño refleja fielmente la realidad antes de empezar a programar. </text:p>
        </text:list-item>
      </text:list>
      <text:p text:style-name="P2"/>
      <text:p text:style-name="P6">2) ¿Qué documento visto anteriormente en el curso es vital consultar a la hora de construir el modelo de análisis para un sistema orientado a objetos?</text:p>
      <text:p text:style-name="P6"/>
      <text:p text:style-name="Standard"><text:span text:style-name="T4">En mi opinión se trata del documento </text:span><text:span text:style-name="T5">2.1 Requerimientos y Análisis Inicial.</text:span> El documento de <text:span text:style-name="T5">Requerimientos</text:span> es el que contiene la lista de necesidades, reglas de negocio y restricciones que el modelo de análisis debe estructurar y resolver. Para identificar los actores, los casos de uso (vistos en el documento <text:span text:style-name="T3">2.2 Casos de Uso</text:span>) y las clases conceptuales, es obligatorio extraer e interpretar los sustantivos y verbos directamente desde la especificación o captura de requerimientos iniciales. Sin este documento, no existe una fuente de verdad para modelar el sistema.</text:p>
      <text:p text:style-name="Standard"/>
      <text:p text:style-name="Standard"/>
      <text:p text:style-name="Standard"/>
      <text:p text:style-name="Standard"/>
      <text:p text:style-name="P7"><text:soft-page-break/>3) Se tienen las siguientes clases para un certamen futbolístico: EQUIPO y JUGADOR. Los atributos que interesan son: De la clase Equipo, su nombre. De la clase Jugador, su cédula y su apellido. Dibuje ambas clases en un Diagrama de Clases Conceptual de UML.</text:p>
      <text:p text:style-name="P7">4) Incorpore asociaciones y multiplicidades a las clases de la pregunta anterior de acuerdo con las siguientes consideraciones: • Cada jugador integra un solo equipo, y cada equipo está integrado por 11 o más jugadores. • Cada jugador capitanea 0 o 1 equipos, y cada equipo es capitaneado por un solo jugador.</text:p>
      <text:p text:style-name="P7">5) ¿Hay alguna restricción que sea necesario incorporar al diagrama anterior? En caso afirmativo, diga cuál es esa restricción.</text:p>
      <text:p text:style-name="P7"/>
      <text:p text:style-name="P8">Este apartado fue desarrollado en la actividad “Diagrama de Clases Conceptual”, por lo que remito la respuesta a ese documento ya entregado.</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span text:style-name="T6">6) Se cuenta con las clases ALUMNO y EXAMEN. Cada alumno rinde cero o más exámenes, mientras que cada examen es rendido por uno o más alumnos. Cuando un alumno rinde un examen, interesa registrar la fecha y la nota. Modele esta realidad mediante un diagrama de Clases Conceptual que utilice una clase de asociación.</text:span></text:p>
      <text:p text:style-name="P8"/>
      <text:p text:style-name="P8"><draw:frame draw:style-name="fr1" draw:name="Imagen1" text:anchor-type="char" svg:width="17cm" svg:height="16.226cm" draw:z-index="0"><draw:image xlink:href="Pictures/1000000000000318000002F49635E56E.png" xlink:type="simple" xlink:show="embed" xlink:actuate="onLoad" draw:mime-type="image/png"/></draw:frame><text:tab/><text:tab/><text:tab/><text:tab/><text:tab/><text:tab/><text:tab/><text:tab/><text:tab/><text:tab/><text:tab/><text:tab/><text:tab/><text:tab/><text:tab/><text:tab/><text:tab/><text:tab/><text:tab/><text:tab/><text:tab/><text:tab/><text:tab/><text:tab/><text:tab/><text:tab/><text:tab/></text:p>
      <text:p text:style-name="P9"><text:span text:style-name="T1">Multiplicidad:</text:span> Un <text:span text:style-name="Source_20_Text">ALUMNO</text:span> puede rendir de <text:span text:style-name="Source_20_Text">0..*</text:span> (cero o más) exámenes, mientras que un <text:span text:style-name="Source_20_Text">EXAMEN</text:span> posee de <text:span text:style-name="Source_20_Text">1..*</text:span> (uno o más) alumnos que lo rinden.</text:p>
      <text:list text:style-name="L2">
        <text:list-item>
          <text:p text:style-name="P10"><text:span text:style-name="T1">Clase de Asociación (</text:span><text:span text:style-name="Source_20_Text"><text:span text:style-name="T1">RENDICION</text:span></text:span><text:span text:style-name="T1">):</text:span> La fecha y la nota no pertenecen intrínsecamente al alumno (un alumno tiene muchas notas) ni al examen (un examen tiene la nota de muchos alumnos). Son atributos que nacen <text:span text:style-name="T1">únicamente</text:span> cuando un alumno concreto rinde un examen específico.</text:p>
        </text:list-item>
      </text:list>
      <text:p text:style-name="P11"/>
      <text:p text:style-name="P12"><text:soft-page-break/><text:span text:style-name="T7">7) </text:span>Incorpore al diagrama de la pregunta anterior la clase PROFESOR y refleje el hecho de que cada examen rendido por cada alumno es corregido por un solo profesor. A su vez, cada profesor corrige muchos exámenes.</text:p>
      <text:p text:style-name="P12"/>
      <text:p text:style-name="P12"><draw:frame draw:style-name="fr2" draw:name="Imagen2" text:anchor-type="char" svg:width="17cm" svg:height="10.104cm" draw:z-index="1"><draw:image xlink:href="Pictures/10000000000004F8000002F4F74CE500.png" xlink:type="simple" xlink:show="embed" xlink:actuate="onLoad" draw:mime-type="image/png"/></draw:frame><text:tab/><text:tab/><text:tab/><text:tab/><text:tab/><text:tab/><text:tab/><text:tab/><text:tab/><text:tab/><text:tab/><text:tab/><text:tab/><text:tab/><text:tab/><text:tab/><text:tab/><text:tab/><text:tab/><text:tab/><text:tab/><text:tab/><text:tab/><text:tab/><text:tab/><text:tab/><text:tab/></text:p>
      <text:p text:style-name="P12"/>
      <text:p text:style-name="P12">8) Utilice agregación y composición para modelar la siguiente realidad: Una computadora está formada por una CPU, por entre uno y tres discos duros y por dos o más periféricos. Puede opcionalmente tener cámara web y parlantes conectados.</text:p>
      <text:p text:style-name="P12"/>
      <text:p text:style-name="P12"/>
      <text:p text:style-name="P12"/>
      <text:p text:style-name="P12"><draw:frame draw:style-name="fr3" draw:name="Imagen3" text:anchor-type="char" svg:x="-0.938cm" svg:y="0.46cm" svg:width="17.955cm" svg:height="6.249cm" draw:z-index="2"><draw:image xlink:href="Pictures/1000000000001670000007D0D7191614.png" xlink:type="simple" xlink:show="embed" xlink:actuate="onLoad" draw:mime-type="image/png"/></draw:frame></text:p>
      <text:p text:style-name="P12"/>
      <text:p text:style-name="P12"/>
      <text:p text:style-name="P12"/>
      <text:p text:style-name="P12"/>
      <text:p text:style-name="P12"><text:soft-page-break/></text:p>
      <text:p text:style-name="P12"/>
      <text:p text:style-name="P8"/>
      <text:p text:style-name="P13"><text:span text:style-name="Source_20_Text"><text:span text:style-name="T5">*--</text:span></text:span><text:span text:style-name="T5"> (Composición): * </text:span><text:span text:style-name="Source_20_Text"><text:span text:style-name="T5">1</text:span></text:span><text:span text:style-name="T5"> CPU: Exactamente una por computadora.</text:span></text:p>
      <text:list text:style-name="L3">
        <text:list-item>
          <text:p text:style-name="P14"><text:span text:style-name="Source_20_Text"><text:span text:style-name="T5">1..3</text:span></text:span><text:span text:style-name="T5"> DISCO_DURO: Entre uno y tres discos duros obligatorios.</text:span></text:p>
        </text:list-item>
      </text:list>
      <text:list text:style-name="L4">
        <text:list-item>
          <text:p text:style-name="P15"><text:span text:style-name="Source_20_Text"><text:span text:style-name="T5">o--</text:span></text:span><text:span text:style-name="T5"> (Agregación):</text:span></text:p>
        </text:list-item>
      </text:list>
      <text:list text:style-name="L5">
        <text:list-item>
          <text:p text:style-name="P16"><text:span text:style-name="Source_20_Text"><text:span text:style-name="T5">2..*</text:span></text:span><text:span text:style-name="T5"> PERIFERICO: Dos o más periféricos conectados obligatoriamente.</text:span></text:p>
        </text:list-item>
        <text:list-item>
          <text:p text:style-name="P16"><text:span text:style-name="Source_20_Text"><text:span text:style-name="T5">0..1</text:span></text:span><text:span text:style-name="T5"> CAMARA_WEB / PARLANTES: Al ser opcionales, su multiplicidad mínima es </text:span><text:span text:style-name="Source_20_Text"><text:span text:style-name="T5">0</text:span></text:span><text:span text:style-name="T5"> (no tiene) y la máxima es </text:span><text:span text:style-name="Source_20_Text"><text:span text:style-name="T5">1</text:span></text:span><text:span text:style-name="T5"> (tiene una).</text:span></text:p>
        </text:list-item>
      </text:list>
      <text:p text:style-name="P12"/>
      <text:p text:style-name="P12"/>
      <text:p text:style-name="P12">9) Se tienen las siguientes clases: VEHÍCULO, AUTO, CAMIÓN. Dibuje un Diagrama de Clases Conceptual que exprese que todo Auto es un Vehículo y que todo Camión es un Vehículo. De acuerdo a las clases dibujadas, ¿Pueden existir Vehículos que no sean Autos ni Camiones? </text:p>
      <text:p text:style-name="P12"/>
      <text:p text:style-name="P12"/>
      <text:p text:style-name="P12"/>
      <text:p text:style-name="P12"/>
      <text:p text:style-name="P12"><draw:frame draw:style-name="fr2" draw:name="Imagen4" text:anchor-type="char" svg:width="17cm" svg:height="12.349cm" draw:z-index="3"><draw:image xlink:href="Pictures/1000000000000AC1000007D01C65D0A7.png" xlink:type="simple" xlink:show="embed" xlink:actuate="onLoad" draw:mime-type="image/png"/></draw:frame></text:p>
      <text:p text:style-name="P12"/>
      <text:p text:style-name="P12"/>
      <text:p text:style-name="P12"/>
      <text:h text:style-name="P17" text:outline-level="3"><text:soft-page-break/>¿Pueden existir Vehículos que no sean Autos ni Camiones?</text:h>
      <text:p text:style-name="P18"><text:span text:style-name="T5">Sí, </text:span><text:span text:style-name="T8">pueden existir vehículos que no sean autos ni camiones</text:span><text:span text:style-name="T5">. Por defecto en UML, las clases son concretas a menos que se especifique lo contrario. Esto significa que el sistema permite crear (instanciar) objetos directamente de la clase </text:span><text:span text:style-name="Source_20_Text"><text:span text:style-name="T5">VEHÍCULO</text:span></text:span><text:span text:style-name="T5"> sin la obligación de que pertenezcan a las subclases </text:span><text:span text:style-name="Source_20_Text"><text:span text:style-name="T5">AUTO</text:span></text:span><text:span text:style-name="T5"> o </text:span><text:span text:style-name="Source_20_Text"><text:span text:style-name="T5">CAMIÓN</text:span></text:span><text:span text:style-name="T5"> (por ejemplo, se podría registrar una motocicleta o un motorhome simplemente como un </text:span><text:span text:style-name="Source_20_Text"><text:span text:style-name="T5">VEHÍCULO</text:span></text:span><text:span text:style-name="T5">).</text:span></text:p>
      <text:h text:style-name="P19" text:outline-level="4">¿Cómo se podría evitar esto en el diseño?</text:h>
      <text:p text:style-name="P18"><text:span text:style-name="T5">Si la regla de negocio del sistema dictara que obligatoriamente cualquier vehículo debe ser un auto o un camión, la clase </text:span><text:span text:style-name="Source_20_Text"><text:span text:style-name="T5">VEHÍCULO</text:span></text:span><text:span text:style-name="T5"> tendría que definirse como una Clase Abstracta (escribiendo su nombre en itálica o utilizando la etiqueta </text:span><text:span text:style-name="Source_20_Text"><text:span text:style-name="T5">&lt;&lt;abstract&gt;&gt;</text:span></text:span><text:span text:style-name="T5">). Al ser abstracta, se prohíbe su instanciación directa, forzando a que todo objeto sea estrictamente una de sus subclases.</text:span></text:p>
      <text:p text:style-name="P8"/>
      <text:p text:style-name="P12"/>
      <text:p text:style-name="P12"/>
      <text:p text:style-name="P12">10) Ahora marque a la clase Vehículo como abstracta y responda nuevamente la pregunta anterior.</text:p>
      <text:p text:style-name="P20"/>
      <text:p text:style-name="P20"/>
      <text:p text:style-name="P20"><draw:frame draw:style-name="fr1" draw:name="Imagen5" text:anchor-type="char" svg:width="17cm" svg:height="13.189cm" draw:z-index="4"><draw:image xlink:href="Pictures/1000000000000A12000007D0A01D86AE.png" xlink:type="simple" xlink:show="embed" xlink:actuate="onLoad" draw:mime-type="image/png"/></draw:frame><text:tab/><text:tab/><text:tab/><text:tab/><text:tab/><text:tab/><text:tab/><text:tab/><text:tab/><text:tab/><text:tab/><text:tab/><text:tab/><text:tab/><text:tab/><text:tab/><text:tab/><text:tab/><text:tab/><text:tab/><text:tab/><text:tab/></text:p>
      <text:p text:style-name="P20"/>
      <text:h text:style-name="P21" text:outline-level="3"><text:soft-page-break/>¿Pueden existir Vehículos que no sean Autos ni Camiones?</text:h>
      <text:p text:style-name="P22"><text:span text:style-name="T5">No, en este nuevo escenario ya no es posible. Al definir a </text:span><text:span text:style-name="Source_20_Text"><text:span text:style-name="T5">VEHÍCULO</text:span></text:span><text:span text:style-name="T5"> explícitamente como una clase abstracta, se le quita la capacidad de ser instanciada directamente. Esto significa que el sistema tiene prohibido crear un objeto genérico de tipo </text:span><text:span text:style-name="Source_20_Text"><text:span text:style-name="T5">VEHÍCULO</text:span></text:span><text:span text:style-name="T5">.</text:span></text:p>
      <text:p text:style-name="P22"><text:span text:style-name="T5">Para que un vehículo pueda existir en la memoria del sistema, obligatoriamente tendrá que ser una instancia de alguna de sus subclases concretas (es decir, tendrá que nacer estrictamente como un </text:span><text:span text:style-name="Source_20_Text"><text:span text:style-name="T5">AUTO</text:span></text:span><text:span text:style-name="T5"> o como un </text:span><text:span text:style-name="Source_20_Text"><text:span text:style-name="T5">CAMIÓN</text:span></text:span><text:span text:style-name="T5">).</text:span></text:p>
      <text:p text:style-name="P23"/>
      <text:p text:style-name="P22">11) Ahora incorpore al dibujo las clases DUEÑO y REMOLQUE de modo que… ♦ La clase DUEÑO se relacione con la clase VEHÍCULO. ♦ Cada Vehículo tiene un único Dueño y cada Dueño tiene al menos un Vehículo. ♦ La clase REMOLQUE se relacione con la clase CAMIÓN. ♦ Cada Camión tiene a lo sumo un Remolque y cada Remolque tiene exactamente un Camión. De acuerdo con este nuevo dibujo… ¿Los Camiones tienen Dueño? ¿Los Autos tienen Dueño? ¿Los Vehículos comunes tienen Remolque? ¿Qué relaciones fueron heredadas por qué clases? </text:p>
      <text:p text:style-name="P20">11) Ahora incorpore al dibujo las clases DUEÑO y REMOLQUE de modo que… ♦ La clase DUEÑO se relacione con la clase VEHÍCULO. ♦ Cada Vehículo tiene un único Dueño y cada Dueño tiene al menos un Vehículo. ♦ La clase REMOLQUE se relacione con la clase CAMIÓN. ♦ Cada Camión tiene a lo sumo un Remolque y cada Remolque tiene exactamente un Camión. De acuerdo con este nuevo dibujo… ¿Los Camiones tienen Dueño? ¿Los Autos tienen Dueño? ¿Los Vehículos comunes tienen Remolque? ¿Qué relaciones fueron heredadas por qué clases?</text:p>
      <text:p text:style-name="P20"/>
      <text:p text:style-name="P20"/>
      <text:p text:style-name="P20"><draw:frame draw:style-name="fr1" draw:name="Imagen6" text:anchor-type="char" svg:width="17cm" svg:height="8.595cm" draw:z-index="5"><draw:image xlink:href="Pictures/1000000000000F73000007D0D0F1927A.png" xlink:type="simple" xlink:show="embed" xlink:actuate="onLoad" draw:mime-type="image/png"/></draw:frame><text:tab/><text:tab/><text:tab/><text:tab/><text:tab/><text:tab/><text:tab/><text:tab/><text:tab/><text:tab/><text:tab/><text:tab/><text:tab/><text:tab/><text:tab/><text:tab/><text:tab/><text:tab/><text:tab/><text:tab/><text:tab/><text:tab/></text:p>
      <text:p text:style-name="P20"/>
      <text:p text:style-name="P20"/>
      <text:p text:style-name="P20"/>
      <text:p text:style-name="P20"/>
      <text:p text:style-name="P24"><text:soft-page-break/>¿Los Camiones tienen Dueño? <text:span text:style-name="T5">Sí. Como </text:span><text:span text:style-name="Source_20_Text"><text:span text:style-name="T5">CAMIÓN</text:span></text:span><text:span text:style-name="T5"> es una subclase que hereda directamente de </text:span><text:span text:style-name="Source_20_Text"><text:span text:style-name="T5">VEHÍCULO</text:span></text:span><text:span text:style-name="T5">, adquiere automáticamente todas sus características y asociaciones. Dado que todo </text:span><text:span text:style-name="Source_20_Text"><text:span text:style-name="T5">VEHÍCULO</text:span></text:span><text:span text:style-name="T5"> tiene un único </text:span><text:span text:style-name="Source_20_Text"><text:span text:style-name="T5">DUEÑO</text:span></text:span><text:span text:style-name="T5">, cualquier instancia de </text:span><text:span text:style-name="Source_20_Text"><text:span text:style-name="T5">CAMIÓN</text:span></text:span><text:span text:style-name="T5"> obligatoriamente tendrá un dueño.</text:span></text:p>
      <text:p text:style-name="P24">¿Los Autos tienen Dueño? <text:span text:style-name="T5">Sí. Por el mismo principio de herencia (generalización), la clase </text:span><text:span text:style-name="Source_20_Text"><text:span text:style-name="T5">AUTO</text:span></text:span><text:span text:style-name="T5"> hereda la relación estructural con la clase </text:span><text:span text:style-name="Source_20_Text"><text:span text:style-name="T5">DUEÑO</text:span></text:span><text:span text:style-name="T5"> proveniente de la superclase </text:span><text:span text:style-name="Source_20_Text"><text:span text:style-name="T5">VEHÍCULO</text:span></text:span><text:span text:style-name="T5">.</text:span></text:p>
      <text:p text:style-name="P24">¿Los Vehículos comunes tienen Remolque? <text:span text:style-name="T5">No. La relación con la clase </text:span><text:span text:style-name="Source_20_Text"><text:span text:style-name="T5">REMOLQUE</text:span></text:span><text:span text:style-name="T5"> se definió de forma exclusiva y específica para la subclase </text:span><text:span text:style-name="Source_20_Text"><text:span text:style-name="T5">CAMIÓN</text:span></text:span><text:span text:style-name="T5">. Los vehículos genéricos o cualquier otra subclase (como </text:span><text:span text:style-name="Source_20_Text"><text:span text:style-name="T5">AUTO</text:span></text:span><text:span text:style-name="T5">) no tienen conocimiento ni acceso a esta relación.</text:span></text:p>
      <text:p text:style-name="P24">¿Qué relaciones fueron heredadas por qué clases? <text:span text:style-name="T5">La relación de asociación "posee" (entre las clases </text:span><text:span text:style-name="Source_20_Text"><text:span text:style-name="T5">DUEÑO</text:span></text:span><text:span text:style-name="T5"> y </text:span><text:span text:style-name="Source_20_Text"><text:span text:style-name="T5">VEHÍCULO</text:span></text:span><text:span text:style-name="T5">) fue heredada por las clases </text:span><text:span text:style-name="Source_20_Text"><text:span text:style-name="T5">AUTO</text:span></text:span><text:span text:style-name="T5"> y </text:span><text:span text:style-name="Source_20_Text"><text:span text:style-name="T5">CAMIÓN</text:span></text:span><text:span text:style-name="T5">. La herencia en UML funciona de manera descendente: las subclases heredan tanto los atributos como las relaciones de su superclase.</text:span></text:p>
      <text:p text:style-name="P25"/>
      <text:p text:style-name="P25"/>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12) Dibuje un Diagrama de Clases Conceptual que modele la siguiente realidad: De los gerentes se registrará su cédula, nombre y departamento. De los vendedores fijos se registrará su cédula, nombre, comisión y horario de trabajo y de los vendedores zafrales su cédula, nombre, comisión y período de contratación. Los vendedores atienden clientes, registrándose la razón social y dirección de cada uno. Cada vendedor atiende al menos un cliente y cada cliente es atendido por muchos vendedores. Cada vez que un vendedor atiende a un cliente se registra la fecha y hora de la atención realizada.</text:p>
      <text:p text:style-name="P20"/>
      <text:p text:style-name="P20"/>
      <text:p text:style-name="P20"><draw:frame draw:style-name="fr3" draw:name="Imagen7" text:anchor-type="char" svg:x="-0.529cm" svg:y="0.056cm" svg:width="17cm" svg:height="14.261cm" draw:z-index="6"><draw:image xlink:href="Pictures/1000000000000950000007D06DCF7537.png" xlink:type="simple" xlink:show="embed" xlink:actuate="onLoad" draw:mime-type="image/png"/></draw:frame></text:p>
      <text:p text:style-name="P20"/>
      <text:p text:style-name="P2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Google Sans Flex" svg:font-family="'Google Sans Flex', 'Google Sans', 'Helvetica Neue',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6-24T22:57:23.191761700</meta:creation-date>
    <dc:date>2026-06-24T23:28:10.374121800</dc:date>
    <meta:editing-duration>PT7M16S</meta:editing-duration>
    <meta:editing-cycles>1</meta:editing-cycles>
    <meta:document-statistic meta:table-count="0" meta:image-count="7" meta:object-count="0" meta:page-count="9" meta:paragraph-count="43" meta:word-count="1512" meta:character-count="9433" meta:non-whitespace-character-count="7864"/>
    <meta:generator>LibreOffice/25.8.7.3$Windows_X86_64 LibreOffice_project/30742500f2d3eb4366ac312fa33d3dcabdb3eba5</meta:generator>
  </office:meta>
</office:document-meta>
</file>